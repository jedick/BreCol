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34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4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hatch" draw:fill-hatch-name="Blue_20_Crossed_20_0_20_Degrees" loext:fill-use-slide-background="false" draw:textarea-horizontal-align="justify" draw:textarea-vertical-align="middle" draw:auto-grow-height="false" fo:min-height="1.024cm" fo:min-width="0.774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draw:marker-start-width="0.252cm" draw:marker-end-width="0.252cm" draw:fill="hatch" draw:fill-hatch-name="Blue_20_Crossed_20_0_20_Degrees" loext:fill-use-slide-background="false" draw:textarea-horizontal-align="justify" draw:textarea-vertical-align="middle" draw:auto-grow-height="false" fo:min-height="0.424cm" fo:min-width="0.174cm" fo:padding-top="0.142cm" fo:padding-bottom="0.142cm" fo:padding-left="0.267cm" fo:padding-right="0.267cm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hatch" draw:fill-hatch-name="Blue_20_Crossed_20_0_20_Degrees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4cm" svg:height="1.673cm" svg:x="0.1cm" svg:y="1.6cm">
          <draw:text-box>
            <text:p>Tetramer counts</text:p>
          </draw:text-box>
        </draw:frame>
        <draw:line draw:style-name="gr2" draw:text-style-name="P2" draw:layer="layout" svg:x1="3.8cm" svg:y1="2.4cm" svg:x2="5.6cm" svg:y2="2.4cm">
          <text:p/>
        </draw:line>
        <draw:line draw:style-name="gr2" draw:text-style-name="P2" draw:layer="layout" svg:x1="3.8cm" svg:y1="4.4cm" svg:x2="5.6cm" svg:y2="4.4cm">
          <text:p/>
        </draw:line>
        <draw:line draw:style-name="gr2" draw:text-style-name="P2" draw:layer="layout" svg:x1="3.8cm" svg:y1="6.4cm" svg:x2="5.6cm" svg:y2="6.4cm">
          <text:p/>
        </draw:line>
        <draw:line draw:style-name="gr2" draw:text-style-name="P2" draw:layer="layout" svg:x1="3.8cm" svg:y1="8.4cm" svg:x2="5.6cm" svg:y2="8.4cm">
          <text:p/>
        </draw:line>
        <draw:frame draw:style-name="gr1" draw:text-style-name="P1" draw:layer="layout" svg:width="3.4cm" svg:height="1.673cm" svg:x="0.1cm" svg:y="5.601cm">
          <draw:text-box>
            <text:p>Tetramer counts</text:p>
          </draw:text-box>
        </draw:frame>
        <draw:frame draw:style-name="gr1" draw:text-style-name="P1" draw:layer="layout" svg:width="3.8cm" svg:height="1.673cm" svg:x="0.1cm" svg:y="3.601cm">
          <draw:text-box>
            <text:p>HyenaDNA</text:p>
            <text:p>backbone</text:p>
          </draw:text-box>
        </draw:frame>
        <draw:frame draw:style-name="gr3" draw:text-style-name="P1" draw:layer="layout" svg:width="4.4cm" svg:height="2.598cm" svg:x="0.1cm" svg:y="7.602cm">
          <draw:text-box>
            <text:p>HyenaDNA</text:p>
            <text:p>backbone</text:p>
            <text:p>(embeddings)</text:p>
          </draw:text-box>
        </draw:frame>
        <draw:frame draw:style-name="gr1" draw:text-style-name="P1" draw:layer="layout" svg:width="4.1cm" svg:height="1.673cm" svg:x="5.7cm" svg:y="1.601cm">
          <draw:text-box>
            <text:p>Run-level aggregation</text:p>
          </draw:text-box>
        </draw:frame>
        <draw:frame draw:style-name="gr1" draw:text-style-name="P1" draw:layer="layout" svg:width="4.7cm" svg:height="1.673cm" svg:x="5.7cm" svg:y="3.602cm">
          <draw:text-box>
            <text:p>Classification head (MLP)</text:p>
          </draw:text-box>
        </draw:frame>
        <draw:frame draw:style-name="gr4" draw:text-style-name="P1" draw:layer="layout" svg:width="4.1cm" svg:height="1.599cm" svg:x="5.7cm" svg:y="5.902cm">
          <draw:text-box>
            <text:p>UC/CAP</text:p>
          </draw:text-box>
        </draw:frame>
        <draw:frame draw:style-name="gr4" draw:text-style-name="P1" draw:layer="layout" svg:width="4.1cm" svg:height="1.599cm" svg:x="5.7cm" svg:y="7.902cm">
          <draw:text-box>
            <text:p>UC/CAP</text:p>
          </draw:text-box>
        </draw:frame>
        <draw:line draw:style-name="gr2" draw:text-style-name="P2" draw:layer="layout" svg:x1="9.8cm" svg:y1="2.4cm" svg:x2="11.6cm" svg:y2="2.4cm">
          <text:p/>
        </draw:line>
        <draw:line draw:style-name="gr2" draw:text-style-name="P2" draw:layer="layout" svg:x1="9.8cm" svg:y1="4.4cm" svg:x2="11.6cm" svg:y2="4.4cm">
          <text:p/>
        </draw:line>
        <draw:line draw:style-name="gr2" draw:text-style-name="P2" draw:layer="layout" svg:x1="9.8cm" svg:y1="6.4cm" svg:x2="11.6cm" svg:y2="6.4cm">
          <text:p/>
        </draw:line>
        <draw:line draw:style-name="gr2" draw:text-style-name="P2" draw:layer="layout" svg:x1="9.8cm" svg:y1="8.4cm" svg:x2="11.6cm" svg:y2="8.4cm">
          <text:p/>
        </draw:line>
        <draw:frame draw:style-name="gr1" draw:text-style-name="P1" draw:layer="layout" svg:width="4.8cm" svg:height="1.673cm" svg:x="11.8cm" svg:y="1.902cm">
          <draw:text-box>
            <text:p>KNN, SVM, RF</text:p>
          </draw:text-box>
        </draw:frame>
        <draw:frame draw:style-name="gr1" draw:text-style-name="P1" draw:layer="layout" svg:width="4.8cm" svg:height="1.673cm" svg:x="11.8cm" svg:y="5.903cm">
          <draw:text-box>
            <text:p>KNN, SVM, RF</text:p>
          </draw:text-box>
        </draw:frame>
        <draw:frame draw:style-name="gr1" draw:text-style-name="P1" draw:layer="layout" svg:width="4.8cm" svg:height="1.673cm" svg:x="11.8cm" svg:y="7.903cm">
          <draw:text-box>
            <text:p>KNN, SVM, RF</text:p>
          </draw:text-box>
        </draw:frame>
        <draw:frame draw:style-name="gr1" draw:text-style-name="P1" draw:layer="layout" svg:width="4.8cm" svg:height="1.673cm" svg:x="11.8cm" svg:y="3.604cm">
          <draw:text-box>
            <text:p>Pool logits; softmax</text:p>
          </draw:text-box>
        </draw:frame>
        <draw:frame draw:style-name="gr5" draw:text-style-name="P4" draw:layer="layout" svg:width="4.8cm" svg:height="1.673cm" svg:x="16.7cm" svg:y="0.003cm">
          <draw:text-box>
            <text:p text:style-name="P3">Feature resolution</text:p>
          </draw:text-box>
        </draw:frame>
        <draw:custom-shape draw:style-name="gr6" draw:text-style-name="P5" draw:layer="layout" svg:width="1.8cm" svg:height="1.8cm" svg:x="18.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cm" svg:height="1.673cm" svg:x="18.2cm" svg:y="2.003cm">
          <draw:text-box>
            <text:p>Low</text:p>
          </draw:text-box>
        </draw:frame>
        <draw:custom-shape draw:style-name="gr7" draw:text-style-name="P5" draw:layer="layout" svg:width="1cm" svg:height="1cm" svg:x="18.022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19.222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19.222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18.022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8cm" svg:height="1.673cm" svg:x="21.2cm" svg:y="0.504cm">
          <draw:text-box>
            <text:p>Learning type</text:p>
          </draw:text-box>
        </draw:frame>
        <draw:frame draw:style-name="gr1" draw:text-style-name="P1" draw:layer="layout" svg:width="4.8cm" svg:height="1.673cm" svg:x="21.2cm" svg:y="1.903cm">
          <draw:text-box>
            <text:p>Classical</text:p>
          </draw:text-box>
        </draw:frame>
        <draw:frame draw:style-name="gr1" draw:text-style-name="P1" draw:layer="layout" svg:width="4.8cm" svg:height="1.673cm" svg:x="21.2cm" svg:y="5.904cm">
          <draw:text-box>
            <text:p>Classical</text:p>
          </draw:text-box>
        </draw:frame>
        <draw:frame draw:style-name="gr1" draw:text-style-name="P1" draw:layer="layout" svg:width="4.8cm" svg:height="1.673cm" svg:x="21.2cm" svg:y="7.905cm">
          <draw:text-box>
            <text:p>Hybrid</text:p>
          </draw:text-box>
        </draw:frame>
        <draw:frame draw:style-name="gr1" draw:text-style-name="P1" draw:layer="layout" svg:width="4.8cm" svg:height="1.673cm" svg:x="21.2cm" svg:y="3.906cm">
          <draw:text-box>
            <text:p>Deep</text:p>
          </draw:text-box>
        </draw:frame>
        <draw:frame draw:style-name="gr1" draw:text-style-name="P1" draw:layer="layout" svg:width="2cm" svg:height="1.673cm" svg:x="18.2cm" svg:y="5.604cm">
          <draw:text-box>
            <text:p>High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Crossed_20_0_20_Degrees" draw:display-name="Blue Crossed 0 Degrees" draw:style="double" draw:color="#000080" draw:distance="0.076cm" draw:rotation="90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5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28cm" svg:x="1cm" svg:y="4.508cm"/>
      <draw:page-thumbnail draw:layer="backgroundobjects" svg:width="8.999cm" svg:height="3.528cm" svg:x="1cm" svg:y="13.084cm"/>
      <draw:page-thumbnail draw:layer="backgroundobjects" svg:width="8.999cm" svg:height="3.528cm" svg:x="1cm" svg:y="21.66cm"/>
      <draw:page-thumbnail draw:layer="backgroundobjects" svg:width="8.999cm" svg:height="3.528cm" svg:x="11cm" svg:y="4.508cm"/>
      <draw:page-thumbnail draw:layer="backgroundobjects" svg:width="8.999cm" svg:height="3.528cm" svg:x="11cm" svg:y="13.084cm"/>
      <draw:page-thumbnail draw:layer="backgroundobjects" svg:width="8.999cm" svg:height="3.528cm" svg:x="11cm" svg:y="21.6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effrey Dick</meta:initial-creator>
    <meta:creation-date>2026-05-21T08:25:31.344405552</meta:creation-date>
    <dc:date>2026-05-21T13:17:44.865992632</dc:date>
    <dc:creator>Jeffrey Dick</dc:creator>
    <meta:editing-duration>PT1H46M26S</meta:editing-duration>
    <meta:editing-cycles>13</meta:editing-cycles>
    <meta:generator>LibreOffice/25.8.2.2$Linux_X86_64 LibreOffice_project/d401f2107ccab8f924a8e2df40f573aab7605b6f</meta:generator>
    <meta:print-date>2026-05-21T13:17:09.185904034</meta:print-date>
    <meta:printed-by>PDF files: Jeffrey Dick</meta:printed-by>
    <meta:document-statistic meta:object-count="56"/>
  </office:meta>
</office:document-meta>
</file>